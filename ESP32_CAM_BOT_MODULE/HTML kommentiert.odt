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monospace" svg:font-family="monospac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.318cm" fo:margin-bottom="0.423cm" style:contextual-spacing="false" fo:line-height="150%" fo:text-indent="0cm" style:auto-text-indent="false"/>
      <style:text-properties style:text-line-through-style="none" style:text-line-through-type="none" style:font-name="Ubuntu" fo:font-size="12pt" style:text-underline-style="none" fo:font-weight="normal" style:text-blinking="false" style:font-size-asian="12pt" style:font-size-complex="12pt" loext:padding="0cm" loext:border="none"/>
    </style:style>
    <style:style style:name="P3" style:family="paragraph" style:parent-style-name="Standard">
      <style:paragraph-properties fo:margin-left="0cm" fo:margin-right="0cm" fo:margin-top="0.318cm" fo:margin-bottom="0.423cm" style:contextual-spacing="false" fo:line-height="150%" fo:text-indent="0cm" style:auto-text-indent="false"/>
      <style:text-properties style:text-line-through-style="none" style:text-line-through-type="none" style:font-name="Ubuntu" fo:font-size="12pt" style:text-underline-style="none" fo:font-weight="normal" officeooo:paragraph-rsid="001d1343" style:text-blinking="false" style:font-size-asian="12pt" style:font-size-complex="12pt" loext:padding="0cm" loext:border="none"/>
    </style:style>
    <style:style style:name="P4" style:family="paragraph" style:parent-style-name="Standard">
      <style:paragraph-properties fo:line-height="150%"/>
      <style:text-properties style:font-name="Ubuntu" fo:font-size="12pt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 style:writing-mode="lr-tb"/>
    </style:style>
    <style:style style:name="T1" style:family="text">
      <style:text-properties style:text-line-through-style="none" style:text-line-through-type="none" style:font-name="monospace" fo:font-size="10.5pt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f0f2f5"/>
    </style:style>
    <style:style style:name="T2" style:family="text">
      <style:text-properties style:text-line-through-style="none" style:text-line-through-type="none" style:font-name="Google Sans" fo:font-size="12pt" style:text-underline-style="none" fo:font-weight="normal" style:text-blinking="false" loext:padding="0cm" loext:border="none"/>
    </style:style>
    <style:style style:name="T3" style:family="text">
      <style:text-properties style:text-line-through-style="none" style:text-line-through-type="none" fo:font-size="12pt" style:text-underline-style="none" fo:font-weight="normal" style:text-blinking="false" loext:padding="0cm" loext:border="none"/>
    </style:style>
    <style:style style:name="T4" style:family="text">
      <style:text-properties style:text-line-through-style="none" style:text-line-through-type="none" fo:font-size="10.5pt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f0f2f5"/>
    </style:style>
    <style:style style:name="T5" style:family="text">
      <style:text-properties style:text-line-through-style="none" style:text-line-through-type="none" style:font-name="Ubuntu" fo:font-size="12pt" style:text-underline-style="none" fo:font-weight="normal" style:text-blinking="false" loext:padding="0cm" loext:border="none"/>
    </style:style>
    <style:style style:name="T6" style:family="text">
      <style:text-properties style:text-line-through-style="none" style:text-line-through-type="none" style:font-name="Ubuntu" fo:font-size="12pt" style:text-underline-style="none" fo:font-weight="normal" style:text-blinking="false" style:font-size-asian="12pt" style:font-size-complex="12pt" loext:padding="0cm" loext:border="none"/>
    </style:style>
    <style:style style:name="T7" style:family="text">
      <style:text-properties style:text-line-through-style="none" style:text-line-through-type="none" style:font-name="Ubuntu" fo:font-size="12pt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f0f2f5"/>
    </style:style>
    <style:style style:name="T8" style:family="text">
      <style:text-properties style:text-line-through-style="none" style:text-line-through-type="none" style:font-name="Ubuntu" fo:font-size="10.5pt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f0f2f5"/>
    </style:style>
    <style:style style:name="T9" style:family="text">
      <style:text-properties style:text-line-through-style="none" style:text-line-through-type="none" style:font-name="Ubuntu" style:text-underline-style="none" fo:font-weight="normal" style:text-blinking="false" loext:padding="0cm" loext:border="none"/>
    </style:style>
    <style:style style:name="T10" style:family="text">
      <style:text-properties style:text-line-through-style="none" style:text-line-through-type="none" style:font-name="Ubuntu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f0f2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// ==============================================================================</text:p>
      <text:p text:style-name="P4">// Datei: html_data.cpp</text:p>
      <text:p text:style-name="P4">// Projekt: ESP32-CAM-BOT-MODULE</text:p>
      <text:p text:style-name="P4">// Beschreibung: Enthält ausschließlich das HTML/JS/CSS-Webinterface.</text:p>
      <text:p text:style-name="P4">// Gespeichert im Flash-Speicher (PROGMEM) zur RAM-Schonung.</text:p>
      <text:p text:style-name="P4">// ==============================================================================</text:p>
      <text:p text:style-name="P4">#include &lt;Arduino.h&gt;</text:p>
      <text:p text:style-name="P4"/>
      <text:p text:style-name="P4">// "extern "C"" verhindert, dass der C++ Compiler den Variablennamen für den Linker verändert.</text:p>
      <text:p text:style-name="P4">// "PROGMEM" sorgt dafür, dass dieser riesige Text im Flash-Speicher bleibt und nicht das knappe RAM blockiert.</text:p>
      <text:p text:style-name="P4">// "R"rawliteral(...)" ist ein Raw-String-Literal. Alles dazwischen wird exakt so übernommen, inklusive Zeilenumbrüchen.</text:p>
      <text:p text:style-name="P4">extern "C" const char INDEX_HTML[] PROGMEM = R"rawliteral(</text:p>
      <text:p text:style-name="P4">&lt;!DOCTYPE html&gt;</text:p>
      <text:p text:style-name="P4">&lt;html lang="de"&gt;</text:p>
      <text:p text:style-name="P4">&lt;head&gt;</text:p>
      <text:p text:style-name="P4"><text:s text:c="4"/>&lt;!-- Definiert den Zeichensatz (UTF-8 unterstützt Umlaute und Emojis) --&gt;</text:p>
      <text:p text:style-name="P4"><text:s text:c="4"/>&lt;meta charset="UTF-8"&gt;</text:p>
      <text:p text:style-name="P4"><text:s text:c="4"/>&lt;!-- Verhindert, dass der Nutzer auf dem Smartphone die Seite versehentlich zoomed (wichtig für Joystick-Bedienung) --&gt;</text:p>
      <text:p text:style-name="P4"><text:s text:c="4"/>&lt;meta name="viewport" content="width=device-width, initial-scale=1, maximum-scale=1, user-scalable=no"&gt;</text:p>
      <text:p text:style-name="P4"><text:s text:c="4"/>&lt;title&gt;CamBot Joystick &amp; Tuning&lt;/title&gt;</text:p>
      <text:p text:style-name="P4"><text:s text:c="4"/></text:p>
      <text:p text:style-name="P4"><text:s text:c="4"/>&lt;style&gt;</text:p>
      <text:p text:style-name="P4"><text:s text:c="4"/>/* --- CSS DESIGN &amp; STYLING --- */</text:p>
      <text:p text:style-name="P4"><text:s text:c="4"/></text:p>
      <text:p text:style-name="P4"><text:s text:c="4"/>/* :root definiert globale Variablen, um Farben zentral zu steuern */</text:p>
      <text:p text:style-name="P4"><text:soft-page-break/><text:s text:c="4"/>:root {</text:p>
      <text:p text:style-name="P4"><text:s text:c="5"/>--bg: #0d0d0d; <text:s text:c="6"/>/* Hintergrundfarbe (fast Schwarz) */</text:p>
      <text:p text:style-name="P4"><text:s text:c="5"/>--panel: #1a1a1a; <text:s text:c="3"/>/* Panel-Hintergrund (Dunkelgrau) */</text:p>
      <text:p text:style-name="P4"><text:s text:c="5"/>--border: #2e2e2e; <text:s text:c="2"/>/* Rahmenfarbe */</text:p>
      <text:p text:style-name="P4"><text:s text:c="5"/>--accent: #e8c547; <text:s text:c="2"/>/* Akzentfarbe (Gelb/Gold) */</text:p>
      <text:p text:style-name="P4"><text:s text:c="5"/>--text: #e0e0e0; <text:s text:c="4"/>/* Textfarbe (Hellgrau) */</text:p>
      <text:p text:style-name="P4"><text:s text:c="5"/>--muted: #666; <text:s text:c="6"/>/* Ausgegrauter Text für Statusmeldungen */</text:p>
      <text:p text:style-name="P4"><text:s text:c="4"/>}</text:p>
      <text:p text:style-name="P4"><text:s text:c="4"/></text:p>
      <text:p text:style-name="P4"><text:s text:c="4"/>/* Universeller Selektor (*): Setzt Abstände für alle Elemente auf 0 */</text:p>
      <text:p text:style-name="P4"><text:s text:c="4"/>* { box-sizing: border-box; margin: 0; padding: 0; }</text:p>
      <text:p text:style-name="P4"><text:s text:c="4"/></text:p>
      <text:p text:style-name="P4"><text:s text:c="4"/>/* Stylt die gesamte Webseite */</text:p>
      <text:p text:style-name="P4"><text:s text:c="4"/>body {</text:p>
      <text:p text:style-name="P4"><text:s text:c="5"/>background: var(--bg); color: var(--text); font-family: 'Courier New', monospace;</text:p>
      <text:p text:style-name="P4"><text:s text:c="5"/>display: flex; flex-direction: column; align-items: center; min-height: 100vh;</text:p>
      <text:p text:style-name="P4"><text:s text:c="5"/>padding: 12px; gap: 12px; </text:p>
      <text:p text:style-name="P4"><text:s text:c="5"/>user-select: none; -webkit-user-select: none; /* Verhindert Textmarkierungen beim Tippen */</text:p>
      <text:p text:style-name="P4"><text:s text:c="4"/>}</text:p>
      <text:p text:style-name="P4"><text:s text:c="4"/></text:p>
      <text:p text:style-name="P4"><text:s text:c="4"/>/* Überschrift */</text:p>
      <text:p text:style-name="P4"><text:s text:c="4"/>h1 { font-size: 1.1rem; letter-spacing: 0.25em; color: var(--accent); text-transform: uppercase; padding: 6px 0; }</text:p>
      <text:p text:style-name="P4"><text:s text:c="4"/></text:p>
      <text:p text:style-name="P4"><text:s text:c="4"/>/* Die Box, in der das Kamerabild angezeigt wird */</text:p>
      <text:p text:style-name="P4"><text:s text:c="4"/>#stream-box {</text:p>
      <text:p text:style-name="P4"><text:s text:c="5"/>width: 100%; max-width: 640px; background: #000; border: 1px solid var(--border);</text:p>
      <text:p text:style-name="P4"><text:s text:c="5"/>border-radius: 4px; overflow: hidden; aspect-ratio: 4/3; display: flex; align-items: center; justify-content: center;</text:p>
      <text:p text:style-name="P4"><text:s text:c="4"/>}</text:p>
      <text:p text:style-name="P4"><text:s text:c="4"/></text:p>
      <text:p text:style-name="P4"><text:s text:c="4"/>/* Das eigentliche Bild (wird per Standard ausgeblendet, bis der Stream startet) */</text:p>
      <text:p text:style-name="P4"><text:s text:c="4"/>#stream { width: 100%; height: 100%; object-fit: contain; display: none; }</text:p>
      <text:p text:style-name="P4"><text:soft-page-break/><text:s text:c="4"/></text:p>
      <text:p text:style-name="P4"><text:s text:c="4"/>/* Platzhaltertext, wenn kein Video läuft */</text:p>
      <text:p text:style-name="P4"><text:s text:c="4"/>#stream-placeholder { color: var(--muted); font-size: 0.8rem; letter-spacing: 0.1em; }</text:p>
      <text:p text:style-name="P4"><text:s text:c="4"/></text:p>
      <text:p text:style-name="P4"><text:s text:c="4"/>/* Reihe für die Buttons unter dem Video */</text:p>
      <text:p text:style-name="P4"><text:s text:c="4"/>.btn-row { display: flex; gap: 10px; width: 100%; max-width: 640px; }</text:p>
      <text:p text:style-name="P4"><text:s text:c="4"/></text:p>
      <text:p text:style-name="P4"><text:s text:c="4"/>/* Allgemeines Design für alle Buttons */</text:p>
      <text:p text:style-name="P4"><text:s text:c="4"/>button {</text:p>
      <text:p text:style-name="P4"><text:s text:c="5"/>flex: 1; padding: 10px; border: 1px solid var(--border); border-radius: 3px;</text:p>
      <text:p text:style-name="P4"><text:s text:c="5"/>background: var(--panel); color: var(--text); font-family: inherit; font-size: 0.85rem;</text:p>
      <text:p text:style-name="P4"><text:s text:c="5"/>letter-spacing: 0.1em; transition: border-color 0.15s, color 0.15s; cursor: pointer;</text:p>
      <text:p text:style-name="P4"><text:s text:c="4"/>}</text:p>
      <text:p text:style-name="P4"><text:s text:c="4"/>/* Hover-Effekt (Mauszeiger drüber) */</text:p>
      <text:p text:style-name="P4"><text:s text:c="4"/>button:hover { border-color: var(--accent); color: var(--accent); }</text:p>
      <text:p text:style-name="P4"><text:s text:c="4"/>/* Active-Effekt (Button wird gedrückt) */</text:p>
      <text:p text:style-name="P4"><text:s text:c="4"/>button:active { background: #222; }</text:p>
      <text:p text:style-name="P4"><text:s text:c="4"/></text:p>
      <text:p text:style-name="P4"><text:s text:c="4"/>/* Spezialklasse für den Licht-Button, wenn das Licht eingeschaltet ist */</text:p>
      <text:p text:style-name="P4"><text:s text:c="4"/>#btn-licht.an { border-color: var(--accent); color: var(--accent); }</text:p>
      <text:p text:style-name="P4"><text:s text:c="4"/></text:p>
      <text:p text:style-name="P4"><text:s text:c="4"/>/* Container für den Joystick */</text:p>
      <text:p text:style-name="P4"><text:s text:c="4"/>.controls {</text:p>
      <text:p text:style-name="P4"><text:s text:c="5"/>width: 100%; max-width: 640px; background: var(--panel); border-radius: 4px;</text:p>
      <text:p text:style-name="P4"><text:s text:c="5"/>border: 1px solid var(--border); padding: 20px; display: flex; justify-content: center; align-items: center;</text:p>
      <text:p text:style-name="P4"><text:s text:c="4"/>}</text:p>
      <text:p text:style-name="P4"><text:s text:c="4"/></text:p>
      <text:p text:style-name="P4"><text:s text:c="4"/>/* Der äußere, gestrichelte Kreis des Joysticks */</text:p>
      <text:p text:style-name="P4"><text:s text:c="4"/>#joystick-zone {</text:p>
      <text:p text:style-name="P4"><text:s text:c="5"/>width: 180px; height: 180px; background: #111; border: 2px dashed var(--border);</text:p>
      <text:p text:style-name="P4"><text:s text:c="5"/>border-radius: 50%; position: relative; touch-action: none; /* touch-action: none verhindert Scrollen beim Ziehen */</text:p>
      <text:p text:style-name="P4"><text:s text:c="4"/>}</text:p>
      <text:p text:style-name="P4"><text:soft-page-break/><text:s text:c="4"/></text:p>
      <text:p text:style-name="P4"><text:s text:c="4"/>/* Der bewegliche Knopfteil (Knob) in der Mitte des Joysticks */</text:p>
      <text:p text:style-name="P4"><text:s text:c="4"/>#joystick-knob {</text:p>
      <text:p text:style-name="P4"><text:s text:c="5"/>width: 54px; height: 54px; background: var(--panel); border: 2px solid var(--accent);</text:p>
      <text:p text:style-name="P4"><text:s text:c="5"/>border-radius: 50%; position: absolute; left: 61px; top: 61px; cursor: pointer;</text:p>
      <text:p text:style-name="P4"><text:s text:c="4"/>}</text:p>
      <text:p text:style-name="P4"><text:s text:c="4"/></text:p>
      <text:p text:style-name="P4"><text:s text:c="4"/>/* Textbereich für Status- und Fehlermeldungen ganz unten */</text:p>
      <text:p text:style-name="P4"><text:s text:c="4"/>#status { font-size: 0.7rem; color: var(--muted); letter-spacing: 0.08em; text-align: center; }</text:p>
      <text:p text:style-name="P4"><text:s text:c="4"/></text:p>
      <text:p text:style-name="P4"><text:s text:c="4"/>/* Das Kalibrierungs-Panel (ausklappbares Tuning-Menü) */</text:p>
      <text:p text:style-name="P4"><text:s text:c="4"/>.tuning-panel {</text:p>
      <text:p text:style-name="P4"><text:s text:c="5"/>width: 100%; max-width: 640px; background: var(--panel); border: 1px solid var(--border);</text:p>
      <text:p text:style-name="P4"><text:s text:c="5"/>border-radius: 4px; padding: 12px; display: flex; flex-direction: column; gap: 10px;</text:p>
      <text:p text:style-name="P4"><text:s text:c="4"/>}</text:p>
      <text:p text:style-name="P4"><text:s text:c="4"/></text:p>
      <text:p text:style-name="P4"><text:s text:c="4"/>/* Der anklickbare Titel des Tuning-Panels */</text:p>
      <text:p text:style-name="P4"><text:s text:c="4"/>.tuning-title {</text:p>
      <text:p text:style-name="P4"><text:s text:c="5"/>font-size: 0.8rem; color: var(--accent); cursor: pointer; text-align: center;</text:p>
      <text:p text:style-name="P4"><text:s text:c="5"/>letter-spacing: 0.1em; padding: 4px; border-bottom: 1px solid #222;</text:p>
      <text:p text:style-name="P4"><text:s text:c="4"/>}</text:p>
      <text:p text:style-name="P4"><text:s text:c="4"/></text:p>
      <text:p text:style-name="P4"><text:s text:c="4"/>/* Inhalt des Tuning-Panels (standardmäßig unsichtbar: display: none) */</text:p>
      <text:p text:style-name="P4"><text:s text:c="4"/>.tuning-content { display: none; flex-direction: column; gap: 8px; }</text:p>
      <text:p text:style-name="P4"><text:s text:c="4"/>/* Wird per JS hinzugefügt, um das Menü sichtbar zu machen */</text:p>
      <text:p text:style-name="P4"><text:s text:c="4"/>.tuning-content.open { display: flex; }</text:p>
      <text:p text:style-name="P4"><text:s text:c="4"/></text:p>
      <text:p text:style-name="P4"><text:s text:c="4"/>/* Zeile für Beschriftung + Eingabefeld im Menü */</text:p>
      <text:p text:style-name="P4"><text:s text:c="4"/>.input-group { display: flex; justify-content: space-between; align-items: center; font-size: 0.8rem; }</text:p>
      <text:p text:style-name="P4"><text:s text:c="4"/>/* Design der Nummerneingabefelder */</text:p>
      <text:p text:style-name="P4"><text:s text:c="4"/>.input-group input {</text:p>
      <text:p text:style-name="P4"><text:soft-page-break/><text:s text:c="5"/>background: #111; border: 1px solid var(--border); color: #fff;</text:p>
      <text:p text:style-name="P4"><text:s text:c="5"/>padding: 6px; width: 80px; text-align: center; font-family: inherit; border-radius: 3px;</text:p>
      <text:p text:style-name="P4"><text:s text:c="4"/>}</text:p>
      <text:p text:style-name="P4"><text:s text:c="4"/>/* Effekt, wenn man in ein Eingabefeld hineinklickt */</text:p>
      <text:p text:style-name="P4"><text:s text:c="4"/>.input-group input:focus { border-color: var(--accent); outline: none; }</text:p>
      <text:p text:style-name="P4"><text:s text:c="4"/>/* Der "Werte anwenden"-Button */</text:p>
      <text:p text:style-name="P4"><text:s text:c="4"/>#btn-save { background: #222; margin-top: 5px; max-height: 35px; }</text:p>
      <text:p text:style-name="P4"><text:s text:c="4"/>&lt;/style&gt;</text:p>
      <text:p text:style-name="P4">&lt;/head&gt;</text:p>
      <text:p text:style-name="P4">&lt;body&gt;</text:p>
      <text:p text:style-name="P4"/>
      <text:p text:style-name="P4"><text:s text:c="4"/>&lt;!-- --- HTML STRUKTUR (WAS MAN SIEHT) --- --&gt;</text:p>
      <text:p text:style-name="P4"><text:s text:c="4"/>&lt;h1&gt;&amp;#9654; CamBot&lt;/h1&gt; &lt;!-- Zeigt ein Play-Symbol und den Namen an --&gt;</text:p>
      <text:p text:style-name="P4"><text:s text:c="4"/></text:p>
      <text:p text:style-name="P4"><text:s text:c="4"/>&lt;!-- Video-Stream Box --&gt;</text:p>
      <text:p text:style-name="P4"><text:s text:c="4"/>&lt;div id="stream-box"&gt;</text:p>
      <text:p text:style-name="P4"><text:s text:c="5"/>&lt;img id="stream" alt="stream"&gt;</text:p>
      <text:p text:style-name="P4"><text:s text:c="5"/>&lt;span id="stream-placeholder"&gt;STREAM GESTOPPT&lt;/span&gt;</text:p>
      <text:p text:style-name="P4"><text:s text:c="4"/>&lt;/div&gt;</text:p>
      <text:p text:style-name="P4"><text:s text:c="4"/></text:p>
      <text:p text:style-name="P4"><text:s text:c="4"/>&lt;!-- Buttons für Stream und LED-Licht --&gt;</text:p>
      <text:p text:style-name="P4"><text:s text:c="4"/>&lt;div class="btn-row"&gt;</text:p>
      <text:p text:style-name="P4"><text:s text:c="5"/>&lt;button id="btn-stream" onclick="toggleStream()"&gt;&amp;#9654; STREAM&lt;/button&gt;</text:p>
      <text:p text:style-name="P4"><text:s text:c="5"/>&lt;button id="btn-licht" onclick="toggleLicht()"&gt;&amp;#9788; LICHT&lt;/button&gt;</text:p>
      <text:p text:style-name="P4"><text:s text:c="4"/>&lt;/div&gt;</text:p>
      <text:p text:style-name="P4"><text:s text:c="4"/></text:p>
      <text:p text:style-name="P4"><text:s text:c="4"/>&lt;!-- Der Joystick-Bereich --&gt;</text:p>
      <text:p text:style-name="P4"><text:s text:c="4"/>&lt;div class="controls"&gt;</text:p>
      <text:p text:style-name="P4"><text:s text:c="5"/>&lt;div id="joystick-zone"&gt;</text:p>
      <text:p text:style-name="P4"><text:s text:c="6"/>&lt;div id="joystick-knob"&gt;&lt;/div&gt;</text:p>
      <text:p text:style-name="P4"><text:s text:c="5"/>&lt;/div&gt;</text:p>
      <text:p text:style-name="P4"><text:s text:c="4"/>&lt;/div&gt;</text:p>
      <text:p text:style-name="P4"><text:s text:c="4"/></text:p>
      <text:p text:style-name="P4"><text:s text:c="4"/>&lt;!-- Tuning / Kalibrierungs-Bereich --&gt;</text:p>
      <text:p text:style-name="P4"><text:soft-page-break/><text:s text:c="4"/>&lt;div class="tuning-panel"&gt;</text:p>
      <text:p text:style-name="P4"><text:s text:c="5"/>&lt;div class="tuning-title" onclick="toggleTuning()"&gt;&amp;#9881; KALIBRIERUNG (KLICKEN)&lt;/div&gt;</text:p>
      <text:p text:style-name="P4"><text:s text:c="5"/>&lt;div id="tuning-box" class="tuning-content"&gt;</text:p>
      <text:p text:style-name="P4"><text:s text:c="9"/>&lt;div class="input-group"&gt;</text:p>
      <text:p text:style-name="P4"><text:s text:c="13"/>&lt;label&gt;Mindest-PWM (0-255):&lt;/label&gt;</text:p>
      <text:p text:style-name="P4"><text:s text:c="13"/>&lt;input type="number" id="inp-min" value="70" min="0" max="255"&gt;</text:p>
      <text:p text:style-name="P4"><text:s text:c="9"/>&lt;/div&gt;</text:p>
      <text:p text:style-name="P4"><text:s text:c="9"/>&lt;div class="input-group"&gt;</text:p>
      <text:p text:style-name="P4"><text:s text:c="13"/>&lt;label&gt;Max Speed (0.0 - 1.0):&lt;/label&gt;</text:p>
      <text:p text:style-name="P4"><text:s text:c="13"/>&lt;input type="number" id="inp-max" value="0.85" step="0.05" min="0" max="1"&gt;</text:p>
      <text:p text:style-name="P4"><text:s text:c="9"/>&lt;/div&gt;</text:p>
      <text:p text:style-name="P4"><text:s text:c="9"/>&lt;div class="input-group"&gt;</text:p>
      <text:p text:style-name="P4"><text:s text:c="13"/>&lt;label&gt;Korrektur Links (0.5 - 1.0):&lt;/label&gt;</text:p>
      <text:p text:style-name="P4"><text:s text:c="13"/>&lt;input type="number" id="inp-kl" value="1.00" step="0.01" min="0.5" max="1"&gt;</text:p>
      <text:p text:style-name="P4"><text:s text:c="9"/>&lt;/div&gt;</text:p>
      <text:p text:style-name="P4"><text:s text:c="9"/>&lt;div class="input-group"&gt;</text:p>
      <text:p text:style-name="P4"><text:s text:c="13"/>&lt;label&gt;Korrektur Rechts (0.5 - 1.0):&lt;/label&gt;</text:p>
      <text:p text:style-name="P4"><text:s text:c="13"/>&lt;input type="number" id="inp-kr" value="1.00" step="0.01" min="0.5" max="1"&gt;</text:p>
      <text:p text:style-name="P4"><text:s text:c="9"/>&lt;/div&gt;</text:p>
      <text:p text:style-name="P4"><text:s text:c="9"/>&lt;button id="btn-save" onclick="sendCalibration()"&gt;WERTE ANWENDEN&lt;/button&gt;</text:p>
      <text:p text:style-name="P4"><text:s text:c="5"/>&lt;/div&gt;</text:p>
      <text:p text:style-name="P4"><text:s text:c="4"/>&lt;/div&gt;</text:p>
      <text:p text:style-name="P4"><text:s text:c="4"/></text:p>
      <text:p text:style-name="P4"><text:s text:c="4"/>&lt;!-- Status-Textzeile ganz unten --&gt;</text:p>
      <text:p text:style-name="P4"><text:s text:c="4"/>&lt;div id="status"&gt;&lt;/div&gt;</text:p>
      <text:p text:style-name="P4"/>
      <text:p text:style-name="P4"><text:s text:c="4"/>&lt;!-- --- JAVASCRIPT LOgIK (FUNKTIONEN) --- --&gt;</text:p>
      <text:p text:style-name="P4"><text:s text:c="4"/>&lt;script&gt;</text:p>
      <text:p text:style-name="P4"><text:s text:c="4"/>// Globale Statusvariablen</text:p>
      <text:p text:style-name="P4"><text:s text:c="4"/>let streamAktiv = false;</text:p>
      <text:p text:style-name="P4"><text:s text:c="4"/>let lichtAn = false;</text:p>
      <text:p text:style-name="P4"><text:s text:c="4"/>let sendTimer = null; // Timer, um die Befehlsübertragung zu drosseln (Debounce)</text:p>
      <text:p text:style-name="P4"><text:s text:c="4"/>let streamUrl = null; <text:s/>// Speichert die IP/URL des Kamera-Streams</text:p>
      <text:p text:style-name="P4"><text:soft-page-break/><text:s text:c="4"/></text:p>
      <text:p text:style-name="P4"><text:s text:c="4"/>// DOM-Elemente referenzieren (JavaScript Zugriff auf HTML erlauben)</text:p>
      <text:p text:style-name="P4"><text:s text:c="4"/>const zone = document.getElementById('joystick-zone');</text:p>
      <text:p text:style-name="P4"><text:s text:c="4"/>const knob = document.getElementById('joystick-knob');</text:p>
      <text:p text:style-name="P4"><text:s text:c="4"/></text:p>
      <text:p text:style-name="P4"><text:s text:c="4"/>// Konstanten für die Joystick-Berechnung</text:p>
      <text:p text:style-name="P4"><text:s text:c="4"/>const maxDistance = 60; // Maximaler Radius, den der Knopf gezogen werden darf (in Pixeln)</text:p>
      <text:p text:style-name="P4"><text:s text:c="4"/>const startX = 61; <text:s text:c="5"/>// Startposition X des Knopfs im Kreis (zentriert)</text:p>
      <text:p text:style-name="P4"><text:s text:c="4"/>const startY = 61; <text:s text:c="5"/>// Startposition Y des Knopfs im Kreis (zentriert)</text:p>
      <text:p text:style-name="P4"><text:s text:c="4"/>let active = false; <text:s text:c="4"/>// Merkt sich, ob der Joystick gerade gedrückt/gezogen wird</text:p>
      <text:p text:style-name="P4"><text:s text:c="4"/></text:p>
      <text:p text:style-name="P4"><text:s text:c="4"/>// Holt beim Laden der Seite die Stream-URL vom ESP32-Server ab (z.B. die IP-Adresse mit Port 81)</text:p>
      <text:p text:style-name="P4"><text:s text:c="4"/>fetch('/streamurl').then(r =&gt; r.text()).then(u =&gt; { streamUrl = u; });</text:p>
      <text:p text:style-name="P4"><text:s text:c="4"/></text:p>
      <text:p text:style-name="P4"><text:s text:c="4"/>// Event-Listener für Touch-Eingaben (Smartphones)</text:p>
      <text:p text:style-name="P4"><text:s text:c="4"/>zone.addEventListener('touchstart', startMove, {passive: false});</text:p>
      <text:p text:style-name="P4"><text:s text:c="4"/>window.addEventListener('touchend', stopMove);</text:p>
      <text:p text:style-name="P4"><text:s text:c="4"/>window.addEventListener('touchmove', move, {passive: false});</text:p>
      <text:p text:style-name="P4"><text:s text:c="4"/></text:p>
      <text:p text:style-name="P4"><text:s text:c="4"/>// Event-Listener für Maus-Eingaben (PC)</text:p>
      <text:p text:style-name="P4"><text:s text:c="4"/>zone.addEventListener('mousedown', startMove);</text:p>
      <text:p text:style-name="P4"><text:s text:c="4"/>window.addEventListener('mouseup', stopMove);</text:p>
      <text:p text:style-name="P4"><text:s text:c="4"/>window.addEventListener('mousemove', move);</text:p>
      <text:p text:style-name="P4"><text:s text:c="4"/></text:p>
      <text:p text:style-name="P4"><text:s text:c="4"/>// Startet die Bewegung, sobald der Nutzer auf den Joystick klickt/tippt</text:p>
      <text:p text:style-name="P4"><text:s text:c="4"/>function startMove(e) { active = true; move(e); }</text:p>
      <text:p text:style-name="P4"><text:s text:c="4"/></text:p>
      <text:p text:style-name="P4"><text:s text:c="4"/>// Setzt den Joystick zurück, wenn der Nutzer loslässt</text:p>
      <text:p text:style-name="P4"><text:s text:c="4"/>function stopMove() {</text:p>
      <text:p text:style-name="P4"><text:s text:c="5"/>if (!active) return;</text:p>
      <text:p text:style-name="P4"><text:s text:c="5"/>active = false;</text:p>
      <text:p text:style-name="P4"><text:soft-page-break/><text:s text:c="5"/>knob.style.left = startX + 'px'; // Springt zurück in die Mitte (X)<text:line-break/></text:p>
      <text:p text:style-name="P2">knob.style.top = startY + 'px'; // Springt zurück in die Mitte (Y)<text:line-break/>update(0, 0); // Sendet "Stopp" (Fahrt=0, Kurve=0) an den Bot<text:line-break/>}</text:p>
      <text:p text:style-name="P2">// Berechnet die Position des Joysticks während des Ziehens<text:line-break/>function move(e) {<text:line-break/>if (!active) return;<text:line-break/>e.preventDefault(); // Verhindert das Scrollen der Webseite beim Ziehen</text:p>
      <text:p text:style-name="P2">let clientX, clientY;<text:line-break/>// Unterscheidung zwischen Touch- und Mauskoordinaten<text:line-break/>if (e.touches) { clientX = e.touches(0).clientX; clientY = e.touches(0).clientY; }<text:line-break/>else { clientX = e.clientX; clientY = e.clientY; }</text:p>
      <text:p text:style-name="P2">// Holt die Position des äußeren Joystick-Kreises auf dem Bildschirm<text:line-break/>const rect = zone.getBoundingClientRect();<text:line-break/>const centerX = rect.left + rect.width / 2;<text:line-break/>const centerY = rect.top + rect.height / 2;</text:p>
      <text:p text:style-name="P2">// Abstand von der Mitte berechnen<text:line-break/>let deltaX = clientX - centerX;<text:line-break/>let deltaY = clientY - centerY;</text:p>
      <text:p text:style-name="P2">// Satz des Pythagoras, um die tatsächliche Luftlinie/Distanz zu berechnen<text:line-break/>let distance = Math.sqrt(deltaX * deltaX + deltaY * deltaY);</text:p>
      <text:p text:style-name="P2">// Wenn der Finger weiter weg ist als erlaubt, begrenze den Knopf auf den Maximalradius (maxDistance)<text:line-break/>if (distance &gt; maxDistance) {<text:line-break/>deltaX = (deltaX / distance) * maxDistance;<text:line-break/><text:soft-page-break/>deltaY = (deltaY / distance) * maxDistance;<text:line-break/>}</text:p>
      <text:p text:style-name="P2">// Verschiebt den HTML-Knopf visuell auf dem Bildschirm<text:line-break/>knob.style.left = (startX + deltaX) + 'px';<text:line-break/>knob.style.top = (startY + deltaY) + 'px';</text:p>
      <text:p text:style-name="P2">// Berechnet die Werte für den Bot (-100 bis +100 Prozent)<text:line-break/>// deltaY ist negativ, wenn man nach oben zieht. Ein Minus davor macht es positiv für "Vorwärtsfahrt".<text:line-break/>let fahrt = Math.round((-deltaY / maxDistance) * 100);<text:line-break/>let kurve = Math.round((deltaX / maxDistance) * 100);</text:p>
      <text:p text:style-name="P2">update(fahrt, kurve);<text:line-break/>}</text:p>
      <text:p text:style-name="P2">// Verhindert, dass bei jeder minimalen Fingerbewegung sofort Daten gesendet werden (Drosselung auf max. alle 40ms)<text:line-break/>function update(f, k) {<text:line-break/>clearTimeout(sendTimer);<text:line-break/>if (f === 0 &amp;&amp; k === 0) {<text:line-break/>sendCtrl(0, 0); // Stopp-Befehl wird sofort ohne Verzögerung gesendet<text:line-break/>} else {<text:line-break/>sendTimer = setTimeout(() =&gt; sendCtrl(f, k), 40); // Wartet 40 Millisekunden ab<text:line-break/>}<text:line-break/>}</text:p>
      <text:p text:style-name="P2">// Sendet die Fahrdaten über ein HTTP-Get-Request an den ESP32-Webserver (/ctrl?fahrt=X&amp;kurve=Y)<text:line-break/>function sendCtrl(f, k) {<text:line-break/>fetch('/ctrl?fahrt=' + f + '&amp;kurve=' + k)<text:line-break/>.then(() =&gt; setStatus('fahrt=' + f + ' kurve=' + k)) // Zeigt aktuelle Werte unten im Status an<text:line-break/>.catch(() =&gt; setStatus('FEHLER - Verbindung verloren')); // Fehler, wenn der ESP32 nicht <text:soft-page-break/>antwortet<text:line-break/>}</text:p>
      <text:p text:style-name="P2">// Blendet das Tuning-Menü ein oder aus (schaltet die CSS-Klasse "open" um)<text:line-break/>function toggleTuning() {<text:line-break/>document.getElementById('tuning-box').classList.toggle('open');<text:line-break/>}</text:p>
      <text:p text:style-name="P2">// Liest die Tuning-Eingabefelder aus und schickt sie an die URL "/cal" des ESP32<text:line-break/>function sendCalibration() {<text:line-break/>const minPwm = document.getElementById('inp-min').value;<text:line-break/>const maxSpeed = document.getElementById('inp-max').value;<text:line-break/>const korrL = document.getElementById('inp-kl').value;<text:line-break/>const korrR = document.getElementById('inp-kr').value;</text:p>
      <text:p text:style-name="P5"><text:span text:style-name="T6">fetch(</text:span><text:span text:style-name="Source_20_Text"><text:span text:style-name="T7">/cal?min_pwm=${minPwm}&amp;max_speed=${maxSpeed}&amp;korr_l=${korrL}&amp;korr_r=${korrR}</text:span></text:span><text:span text:style-name="T6">)<text:line-break/>.then(() =&gt; setStatus('Kalibrierung erfolgreich angewendet!'))<text:line-break/>.catch(() =&gt; setStatus('FEHLER beim Senden der Kalibrierung'));<text:line-break/>}</text:span></text:p>
      <text:p text:style-name="P2">// Schaltet den Video-Stream an oder aus<text:line-break/>function toggleStream() {<text:line-break/>const img = document.getElementById('stream');<text:line-break/>const ph = document.getElementById('stream-placeholder');<text:line-break/>const btn = document.getElementById('btn-stream');</text:p>
      <text:p text:style-name="P2">streamAktiv = !streamAktiv; // Zustand umkehren</text:p>
      <text:p text:style-name="P2">if (streamAktiv &amp;&amp; streamUrl) {<text:line-break/>img.src = streamUrl; // Weist dem Bild die Stream-URL zu (Video startet)<text:line-break/>img.style.display = 'block'; // Zeigt das Bild an<text:line-break/>ph.style.display = 'none'; // Versteckt den Platzhaltertext<text:line-break/>btn.textContent = '\u23F9 STREAM'; // Ändert den Button-Text zu einem Stopp-Symbol + STREAM<text:line-break/><text:soft-page-break/>setStatus('Stream laeuft auf Port 81');<text:line-break/>} else {<text:line-break/>img.src = ''; // Leert die Quelle (stoppt den Datenstrom im Hintergrund)<text:line-break/>img.style.display = 'none'; // Versteckt das Bild<text:line-break/>ph.style.display = 'block'; // Zeigt den Platzhaltertext "STREAM GESTOPPT"<text:line-break/>btn.textContent = '\u25B6 STREAM'; // Ändert den Button-Text wieder zum Play-Symbol<text:line-break/>streamAktiv = false;<text:line-break/>setStatus('Stream gestoppt');<text:line-break/>}<text:line-break/>}</text:p>
      <text:p text:style-name="P3">// Schaltet die LED am Bot ein oder aus<text:line-break/>function toggleLicht() {<text:line-break/>fetch('/licht').then(r =&gt; r.text()).then(t =&gt; {<text:line-break/>// Der ESP32 antwortet entweder mit dem Text "AN" oder "AUS"<text:line-break/>lichtAn = (t === 'AN');<text:line-break/>// Fügt die CSS-Klasse "an" hinzu oder entfernt sie, um den Button gelb leuchten zu lassen<text:line-break/>document.getElementById('btn-licht').classList.toggle('an', lichtAn);<text:line-break/>setStatus('Licht ' + t);<text:line-break/>}).catch(() =&gt; setStatus('FEHLER - Licht'));<text:line-break/>}</text:p>
      <text:p text:style-name="P3">// Hilfsfunktion, um schnell Text in die Statuszeile ganz unten zu schreiben<text:line-break/>function setStatus(msg) { document.getElementById('status').textContent = msg; }<text:line-break/>)rawliteral";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<text:bookmark-start text:name="PageNumWizard_FOOTER_Standard2"/><text:page-number text:select-page="current">11</text:page-number><text:s/>/ <text:page-count>11</text:page-count><text:bookmark-end text:name="PageNumWizard_FOOTER_Standard2"/></text:p>
        <text:p text:style-name="Footer"><text:date style:data-style-name="N37" text:date-value="2026-05-22T14:37:55.316339498">22.05.26</text:date><text:s/><text:time style:data-style-name="N61" text:time-value="2026-05-22T14:37:55.316390418">14:37:47</text:time><text:s text:c="8"/><text:file-name text:display="name-and-extension">HTML kommentiert.odt</text:file-name><text:s text:c="7"/><text:subject>ESP32-CAM-BOT-MODULE</text:subjec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2T14:30:09.738295518</meta:creation-date>
    <dc:date>2026-05-22T14:37:55.290947747</dc:date>
    <meta:editing-duration>PT7M45S</meta:editing-duration>
    <meta:editing-cycles>2</meta:editing-cycles>
    <meta:generator>LibreOffice/24.2.7.2$Linux_X86_64 LibreOffice_project/420$Build-2</meta:generator>
    <dc:subject>ESP32-CAM-BOT-MODULE</dc:subject>
    <meta:document-statistic meta:table-count="0" meta:image-count="0" meta:object-count="0" meta:page-count="11" meta:paragraph-count="237" meta:word-count="1759" meta:character-count="14397" meta:non-whitespace-character-count="11876"/>
  </office:meta>
</office:document-meta>
</file>